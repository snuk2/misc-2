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3.2.0 -->
  <office:font-face-decls>
    <style:font-face style:name="Lohit Devanagari" svg:font-family="Lohit Devanagari" style:font-pitch="variable"/>
    <style:font-face style:name="Liberation Serif" svg:font-family="Liberation Serif" style:font-pitch="variable" style:font-family-generic="roman"/>
    <style:font-face style:name="Liberation Sans" svg:font-family="Liberation Sans" style:font-pitch="variable" style:font-family-generic="swiss"/>
    <style:font-face style:name="WenQuanYi Micro Hei" svg:font-family="WenQuanYi Micro Hei" style:font-pitch="variable"/>
    <style:font-face style:name="Times New Roman" svg:font-family="Times New Roman"/>
  </office:font-face-decls>
  <office:automatic-styles>
    <style:style style:name="P1" style:family="paragraph" style:parent-style-name="Standard" style:master-page-name="Standard"/>
    <style:style style:name="T1_1" style:family="text"/>
    <style:style style:name="P2" style:family="paragraph" style:parent-style-name="Standard"/>
    <style:style style:name="T2_1" style:family="text"/>
    <style:style style:name="P3" style:family="paragraph" style:parent-style-name="Standard"/>
    <style:style style:name="T3_1" style:family="text"/>
    <style:style style:name="P4" style:family="paragraph" style:parent-style-name="Standard"/>
    <style:style style:name="T4_1" style:family="text"/>
    <style:style style:name="P5" style:family="paragraph" style:parent-style-name="Standard"/>
    <style:style style:name="T5_1" style:family="text"/>
    <style:style style:name="P6" style:family="paragraph" style:parent-style-name="Standard"/>
    <style:style style:name="P7" style:family="paragraph" style:parent-style-name="Standard"/>
    <style:style style:name="T7_1" style:family="text"/>
    <style:style style:name="T7_2" style:family="text"/>
    <style:style style:name="T7_3" style:family="text"/>
  </office:automatic-styles>
  <office:body>
    <office:text>
      <text:p text:style-name="P1"><text:span text:style-name="T1_1">TOP<text:s/>SECRET<text:s/>MEMO</text:span></text:p>
      <text:p text:style-name="P2"><text:span text:style-name="T2_1">Attention<text:s/>SDSC<text:s/>executives,</text:span></text:p>
      <text:p text:style-name="P3"><text:span text:style-name="T3_1">The<text:s/>layoffs<text:s/>we<text:s/>predicted<text:s/>earlier<text:s/>will<text:s/>not<text:s/>suffice.<text:s/>We<text:s/>now<text:s/>estimate<text:s/>we<text:s/>will<text:s/>have<text:s/>to<text:s/>layoff<text:s/>cloder</text:span></text:p>
      <text:p text:style-name="P4"><text:span text:style-name="T4_1">to<text:s/>80%<text:s/>of<text:s/>the<text:s/>workforce.<text:s/>The<text:s/>shareholders<text:s/>will<text:s/>not<text:s/>be<text:s/>happy.<text:s/>You<text:s/>may<text:s/>want<text:s/>to<text:s/>sell<text:s/>your<text:s/>shares<text:s/>before</text:span></text:p>
      <text:p text:style-name="P5"><text:span text:style-name="T5_1">we<text:s/>go<text:s/>public.<text:s/>Don’t<text:s/>think<text:s/>you<text:s/>weren't<text:s/>warned.</text:span></text:p>
      <text:p text:style-name="P6"/>
      <text:p text:style-name="P7"><text:span text:style-name="T7_1">#token<text:s/>&lt;</text:span><text:span text:style-name="T7_2">stophoardingtoiletpaper</text:span><text:span text:style-name="T7_3">&gt;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Lohit Devanagari" svg:font-family="Lohit Devanagari" style:font-pitch="variable"/>
    <style:font-face style:name="Liberation Serif" svg:font-family="Liberation Serif" style:font-pitch="variable" style:font-family-generic="roman"/>
    <style:font-face style:name="Liberation Sans" svg:font-family="Liberation Sans" style:font-pitch="variable" style:font-family-generic="swiss"/>
    <style:font-face style:name="WenQuanYi Micro Hei" svg:font-family="WenQuanYi Micro Hei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orphans="2" fo:widows="2" fo:hyphenation-ladder-count="no-limit" style:tab-stop-distance="0.741cm"/>
      <style:text-properties style:use-window-font-color="true" style:font-name="Liberation Serif" fo:font-size="12pt" style:font-name-asian="WenQuanYi Micro Hei" style:font-size-asian="12pt" style:font-name-complex="Lohit Devanagari" style:font-size-complex="12pt" fo:language="en" fo:language-asian="zh" fo:language-complex="hi" fo:country="US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>
      <style:paragraph-properties fo:line-height="115%" fo:margin-top="0cm" fo:margin-bottom="0.247cm"/>
    </style:style>
    <style:style style:name="List" style:family="paragraph" style:parent-style-name="Text_20_body">
      <style:text-properties style:font-name-complex="Lohit Devanagari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name-complex="Lohit Devanagari" style:font-size-complex="12pt"/>
    </style:style>
    <style:style style:name="Index" style:family="paragraph" style:parent-style-name="Standard">
      <style:text-properties style:font-name-complex="Lohit Devanagari"/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3.2.0</meta:generator>
    <dc:title/>
    <meta:initial-creator/>
    <meta:creation-date>2019-03-17T13:30:04</meta:creation-date>
    <dc:creator/>
    <dc:date>2020-03-27T19:12:45</dc:date>
    <meta:editing-cycles>3</meta:editing-cycles>
    <meta:editing-duration>PT3M</meta:editing-duration>
    <meta:document-statistic meta:page-count="1" meta:paragraph-count="6" meta:row-count="0" meta:word-count="52" meta:character-count="314" meta:non-whitespace-character-count="268"/>
  </office:meta>
</office:document-meta>
</file>